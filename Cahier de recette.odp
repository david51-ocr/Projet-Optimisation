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6CD000002E8389CEC0A.png"/>
  <manifest:file-entry manifest:media-type="image/png" manifest:full-path="Pictures/1000020100000166000001F54E9F78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auto-grow-height="true" fo:min-height="3.506cm"/>
    </style:style>
    <style:style style:name="pr2" style:family="presentation" style:parent-style-name="lyt-darkblue-subtitle">
      <style:graphic-properties draw:fill-color="#ffffff" draw:auto-grow-height="true" fo:min-height="13.714cm"/>
    </style:style>
    <style:style style:name="pr3" style:family="presentation" style:parent-style-name="lyt-darkblue-notes">
      <style:graphic-properties draw:fill-color="#ffffff" draw:auto-grow-height="true" fo:min-height="11.409cm"/>
    </style:style>
    <style:style style:name="pr4" style:family="presentation" style:parent-style-name="lyt-darkblue-title">
      <style:graphic-properties fo:min-height="1.6cm"/>
    </style:style>
    <style:style style:name="pr5" style:family="presentation" style:parent-style-name="lyt-darkblue-outline1">
      <style:graphic-properties fo:min-height="19.2cm"/>
    </style:style>
    <style:style style:name="pr6" style:family="presentation" style:parent-style-name="lyt-darkblue-notes">
      <style:graphic-properties draw:fill-color="#ffffff" fo:min-height="11.409cm"/>
    </style:style>
    <style:style style:name="pr7" style:family="presentation" style:parent-style-name="lyt-darkblue-title">
      <style:graphic-properties fo:min-height="3.506cm"/>
    </style:style>
    <style:style style:name="pr8" style:family="presentation" style:parent-style-name="lyt-darkblue-outline1">
      <style:graphic-properties fo:min-height="13.714cm"/>
    </style:style>
    <style:style style:name="P1" style:family="paragraph">
      <style:paragraph-properties fo:text-align="center"/>
    </style:style>
    <style:style style:name="P2" style:family="paragraph">
      <style:text-properties fo:font-size="24pt"/>
    </style:style>
    <style:style style:name="T1" style:family="text">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draw:frame presentation:style-name="pr1" draw:text-style-name="P1" draw:layer="layout" svg:width="23.911cm" svg:height="3.506cm" svg:x="2.058cm" svg:y="0.784cm" presentation:class="title" presentation:user-transformed="true">
          <draw:text-box>
            <text:p text:style-name="P1">Cahier de recettes</text:p>
          </draw:text-box>
        </draw:frame>
        <draw:frame presentation:style-name="pr2" draw:text-style-name="P2" draw:layer="layout" svg:width="24.368cm" svg:height="13.714cm" svg:x="2.058cm" svg:y="5.453cm" presentation:class="subtitle" presentation:placeholder="true">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darkblue" presentation:presentation-page-layout-name="AL2T1">
        <draw:frame presentation:style-name="pr4" draw:layer="layout" svg:width="23.911cm" svg:height="1.6cm" svg:x="3cm" svg:y="0.2cm" presentation:class="title" presentation:user-transformed="true">
          <draw:text-box>
            <text:p>Le rapport d'intervention</text:p>
          </draw:text-box>
        </draw:frame>
        <draw:frame presentation:style-name="pr5" draw:layer="layout" svg:width="27.6cm" svg:height="19.2cm" svg:x="0.2cm" svg:y="1.6cm" presentation:class="outline" presentation:user-transformed="true">
          <draw:text-box>
            <text:p/>
            <text:p/>
            <text:p/>
            <text:p>Rapport d’intervention – Optimisation SEO et débogage du site de Nina Carducci<text:line-break/><text:line-break/>1. Contexte<text:line-break/><text:line-break/>Dans le cadre de cette intervention, l’objectif était d’améliorer les<text:line-break/>performances, l’accessibilité et le référencement naturel du site de la<text:line-break/>photographe Nina Carducci tout en corrigeant les problèmes techniques<text:line-break/>détectés.<text:line-break/><text:line-break/></text:p>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2T1">
        <draw:frame presentation:style-name="pr7" draw:layer="layout" svg:width="23.911cm" svg:height="3.506cm" svg:x="2.058cm" svg:y="0.784cm" presentation:class="title" presentation:user-transformed="true">
          <draw:text-box>
            <text:p>Le Rapport d'intervention</text:p>
          </draw:text-box>
        </draw:frame>
        <draw:frame presentation:style-name="pr8" draw:layer="layout" svg:width="24.368cm" svg:height="16.202cm" svg:x="1.832cm" svg:y="3.8cm" presentation:class="outline" presentation:user-transformed="true">
          <draw:text-box>
            <text:p><text:span text:style-name="T1">2. Corrections réalisées</text:span><text:span text:style-name="T1"><text:line-break/></text:span><text:span text:style-name="T1"><text:line-break/></text:span><text:span text:style-name="T1">Optimisation des performances</text:span><text:span text:style-name="T1"><text:line-break/></text:span><text:span text:style-name="T1"><text:line-break/></text:span><text:span text:style-name="T1">- <text:s text:c="2"/>Conversion des images au format WebP afin de réduire leur poids.</text:span><text:span text:style-name="T1"><text:line-break/></text:span><text:span text:style-name="T1">- <text:s text:c="2"/>Optimisation des ressources utilisées par le site.</text:span><text:span text:style-name="T1"><text:line-break/></text:span><text:span text:style-name="T1">- <text:s text:c="2"/>Vérification des performances avec Lighthouse.</text:span><text:span text:style-name="T1"><text:line-break/></text:span><text:span text:style-name="T1">- <text:s text:c="2"/>Réduction des éléments ralentissant le chargement des pages.</text:span><text:span text:style-name="T1"><text:line-break/></text:span><text:span text:style-name="T1"><text:line-break/></text:span><text:span text:style-name="T1">Accessibilité</text:span><text:span text:style-name="T1"><text:line-break/></text:span><text:span text:style-name="T1"><text:line-break/></text:span><text:span text:style-name="T1">- <text:s text:c="2"/>Ajout d’attributs alt descriptifs sur les images.</text:span><text:span text:style-name="T1"><text:line-break/></text:span><text:span text:style-name="T1">- <text:s text:c="2"/>Amélioration de la hiérarchie des titres.</text:span><text:span text:style-name="T1"><text:line-break/></text:span><text:span text:style-name="T1">- <text:s text:c="2"/>Association des balises label avec les champs du formulaire.</text:span><text:span text:style-name="T1"><text:line-break/></text:span><text:span text:style-name="T1">- <text:s text:c="2"/>Amélioration du contraste de certains éléments détectés par</text:span><text:span text:style-name="T1"><text:line-break/></text:span><text:span text:style-name="T1"> <text:s text:c="3"/>Wave Evaluation Tool.</text:span><text:span text:style-name="T1"><text:line-break/></text:span><text:span text:style-name="T1"/></text:p>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2T1">
        <draw:frame presentation:style-name="pr7" draw:layer="layout" svg:width="23.911cm" svg:height="3.506cm" svg:x="2.058cm" svg:y="0.784cm" presentation:class="title">
          <draw:text-box>
            <text:p>L'accessibilité avec Wave</text:p>
          </draw:text-box>
        </draw:frame>
        <draw:frame draw:style-name="gr2" draw:text-style-name="P1" draw:layer="layout" svg:width="9.472cm" svg:height="13.256cm" svg:x="9.6cm" svg:y="5.544cm">
          <draw:image xlink:href="Pictures/1000020100000166000001F54E9F781C.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6" draw:text-style-name="P2"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2T1">
        <draw:frame presentation:style-name="pr7" draw:layer="layout" svg:width="23.911cm" svg:height="3.506cm" svg:x="2.058cm" svg:y="0.784cm" presentation:class="title" presentation:user-transformed="true">
          <draw:text-box>
            <text:p>Le rapport d'intervention</text:p>
          </draw:text-box>
        </draw:frame>
        <draw:frame presentation:style-name="pr8" draw:layer="layout" svg:width="24.368cm" svg:height="13.714cm" svg:x="2.058cm" svg:y="5.453cm" presentation:class="outline" presentation:user-transformed="true">
          <draw:text-box>
            <text:p>Référencement naturel (SEO)<text:line-break/><text:line-break/>- <text:s text:c="2"/>Optimisation de la balise Title.<text:line-break/>- <text:s text:c="2"/>Optimisation de la Meta Description.<text:line-break/>- <text:s text:c="2"/>Ajout des balises Open Graph.<text:line-break/>- <text:s text:c="2"/>Ajout des Twitter Cards.<text:line-break/>- <text:s text:c="2"/>Amélioration du référencement local avec les mots-clés « photographe<text:line-break/> <text:s text:c="3"/>à Bordeaux ».<text:line-break/>- <text:s text:c="2"/>Ajout de données structurées Schema.org (JSON-LD) de type<text:line-break/> <text:s text:c="3"/>LocalBusiness.<text:line-break/>- <text:s text:c="2"/>Optimisation des textes alternatifs (alt) des images.<text:line-break/><text:line-break/></text:p>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2T1">
        <draw:frame presentation:style-name="pr7" draw:layer="layout" svg:width="23.911cm" svg:height="3.506cm" svg:x="2.058cm" svg:y="0.784cm" presentation:class="title" presentation:user-transformed="true">
          <draw:text-box>
            <text:p>Rich Snippet</text:p>
          </draw:text-box>
        </draw:frame>
        <draw:frame draw:style-name="gr2" draw:text-style-name="P1" draw:layer="layout" svg:width="26.2cm" svg:height="11.964cm" svg:x="1cm" svg:y="6.236cm">
          <draw:image xlink:href="Pictures/10000201000006CD000002E8389CEC0A.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6" draw:text-style-name="P2"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2T1">
        <draw:frame presentation:style-name="pr7" draw:layer="layout" svg:width="23.911cm" svg:height="3.506cm" svg:x="2.058cm" svg:y="0.784cm" presentation:class="title">
          <draw:text-box>
            <text:p>Cas d'usage : click sur le caroussel</text:p>
          </draw:text-box>
        </draw:frame>
        <draw:frame presentation:style-name="pr8" draw:layer="layout" svg:width="24.368cm" svg:height="13.714cm" svg:x="2.058cm" svg:y="5.453cm" presentation:class="outline">
          <draw:text-box>
            <text:list text:style-name="L2">
              <text:list-item>
                <text:p>Afin de vérifier le bon fonctionnement du carrousel présent sur la page d'accueil, un test a été réalisé en utilisant les boutons de navigation « Précédent » et « Suivant ». Lors d'un clic sur la flèche « Suivant », le carrousel affiche correctement l'image suivante avec une transition fluide, tandis que l'indicateur actif est mis à jour. De la même manière, un clic sur la flèche « Précédent » permet de revenir à l'image précédente sans anomalie. Les indicateurs situés sous le carrousel permettent également d'accéder directement à l'image correspondante. Aucun dysfonctionnement n'a été constaté lors des différents tests, le comportement du composant est conforme aux attentes.</text:p>
              </text:list-item>
            </text:list>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lyt-darkblue" presentation:presentation-page-layout-name="AL2T1">
        <draw:frame presentation:style-name="pr7" draw:layer="layout" svg:width="23.911cm" svg:height="3.506cm" svg:x="2.058cm" svg:y="0.784cm" presentation:class="title">
          <draw:text-box>
            <text:p>Le rapport d'intervention<text:line-break/></text:p>
          </draw:text-box>
        </draw:frame>
        <draw:frame presentation:style-name="pr8" draw:layer="layout" svg:width="24.368cm" svg:height="13.714cm" svg:x="2.058cm" svg:y="5.453cm" presentation:class="outline" presentation:user-transformed="true">
          <draw:text-box>
            <text:p>Débogage<text:line-break/><text:line-break/>- <text:s text:c="2"/>Correction de la structure HTML.<text:line-break/>- <text:s text:c="2"/>Correction de la position de la balise<text:line-break/>- <text:s text:c="2"/>Vérification de la validité des données structurées.<text:line-break/>- <text:s text:c="2"/>Correction de plusieurs problèmes signalés par Lighthouse.</text:p>
            <text:p>- Résolution des bugs demandés. (le click sur les filtres et les flèches pour changer d'image</text:p>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lyt-darkblue" presentation:presentation-page-layout-name="AL2T1">
        <draw:frame presentation:style-name="pr7" draw:layer="layout" svg:width="23.911cm" svg:height="3.506cm" svg:x="2.058cm" svg:y="0.784cm" presentation:class="title">
          <draw:text-box>
            <text:p>Le rapport d'intervention</text:p>
          </draw:text-box>
        </draw:frame>
        <draw:frame presentation:style-name="pr8" draw:layer="layout" svg:width="24.368cm" svg:height="15.296cm" svg:x="2.058cm" svg:y="5.453cm" presentation:class="outline" presentation:user-transformed="true">
          <draw:text-box>
            <text:p><text:span text:style-name="T1">3. Tests réalisés</text:span><text:span text:style-name="T1"><text:line-break/></text:span><text:span text:style-name="T1"><text:line-break/></text:span><text:span text:style-name="T1">- <text:s text:c="2"/>Audit Lighthouse.</text:span><text:span text:style-name="T1"><text:line-break/></text:span><text:span text:style-name="T1">- <text:s text:c="2"/>Test des données structurées avec Google Rich Results Test.</text:span><text:span text:style-name="T1"><text:line-break/></text:span><text:span text:style-name="T1">- <text:s text:c="2"/>Contrôle du fonctionnement du carrousel.</text:span><text:span text:style-name="T1"><text:line-break/></text:span><text:span text:style-name="T1">- <text:s text:c="2"/>Vérification de la galerie filtrable.</text:span><text:span text:style-name="T1"><text:line-break/></text:span><text:span text:style-name="T1">- <text:s text:c="2"/>Vérification du formulaire de contact.</text:span></text:p>
            <text:p><text:span text:style-name="T1">4. Résultats obtenus</text:span><text:span text:style-name="T1"><text:line-break/></text:span><text:span text:style-name="T1"><text:line-break/></text:span><text:span text:style-name="T1">- <text:s text:c="2"/>Amélioration des performances du site.</text:span><text:span text:style-name="T1"><text:line-break/></text:span><text:span text:style-name="T1">- <text:s text:c="2"/>Amélioration de l’accessibilité.</text:span><text:span text:style-name="T1"><text:line-break/></text:span><text:span text:style-name="T1">- <text:s text:c="2"/>Amélioration du référencement naturel.</text:span><text:span text:style-name="T1"><text:line-break/></text:span><text:span text:style-name="T1">- <text:s text:c="2"/>Amélioration du référencement local.</text:span><text:span text:style-name="T1"><text:line-break/></text:span><text:span text:style-name="T1">- <text:s text:c="2"/>Amélioration de l’expérience utilisateur.</text:span></text:p>
            <text:p><text:span text:style-name="T1"/></text:p>
          </draw:text-box>
        </draw:frame>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lyt-darkblue" presentation:presentation-page-layout-name="AL2T1">
        <draw:frame presentation:style-name="pr7" draw:layer="layout" svg:width="23.911cm" svg:height="3.506cm" svg:x="2.058cm" svg:y="0.784cm" presentation:class="title" presentation:user-transformed="true">
          <draw:text-box>
            <text:p>Le rapport d'intervention</text:p>
          </draw:text-box>
        </draw:frame>
        <draw:frame presentation:style-name="pr8" draw:layer="layout" svg:width="24.368cm" svg:height="13.714cm" svg:x="2.058cm" svg:y="5.453cm" presentation:class="outline">
          <draw:text-box>
            <text:p><text:span text:style-name="T1">Fonction <text:s text:c="16"/>Résultat</text:span><text:span text:style-name="T1"><text:line-break/></text:span><text:span text:style-name="T1"> <text:s/>------------------------ ----------</text:span><text:span text:style-name="T1"><text:line-break/></text:span><text:span text:style-name="T1"> <text:s/>Navigation <text:s text:c="14"/>Conforme</text:span><text:span text:style-name="T1"><text:line-break/></text:span><text:span text:style-name="T1"> <text:s/>Carrousel <text:s text:c="15"/>Conforme</text:span><text:span text:style-name="T1"><text:line-break/></text:span><text:span text:style-name="T1"> <text:s/>Galerie filtrable <text:s text:c="7"/>Conforme</text:span><text:span text:style-name="T1"><text:line-break/></text:span><text:span text:style-name="T1"> <text:s/>Images (attributs alt) <text:s text:c="2"/>Conforme</text:span><text:span text:style-name="T1"><text:line-break/></text:span><text:span text:style-name="T1"> <text:s/>Formulaire de contact <text:s text:c="3"/>Conforme</text:span><text:span text:style-name="T1"><text:line-break/></text:span><text:span text:style-name="T1"> <text:s/>Responsive <text:s text:c="14"/>Conforme</text:span><text:span text:style-name="T1"><text:line-break/></text:span><text:span text:style-name="T1"> <text:s/>Balises SEO <text:s text:c="13"/>Conforme</text:span><text:span text:style-name="T1"><text:line-break/></text:span><text:span text:style-name="T1"> <text:s/>Open Graph <text:s text:c="14"/>Conforme</text:span><text:span text:style-name="T1"><text:line-break/></text:span><text:span text:style-name="T1"> <text:s/>Twitter Cards <text:s text:c="11"/>Conforme</text:span><text:span text:style-name="T1"><text:line-break/></text:span><text:span text:style-name="T1"> <text:s/>Données structurées <text:s text:c="5"/>Conforme <text:s text:c="4"/></text:span></text:p>
          </draw:text-box>
        </draw:frame>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lyt-darkblue" presentation:presentation-page-layout-name="AL2T1">
        <draw:frame presentation:style-name="pr7" draw:layer="layout" svg:width="23.911cm" svg:height="3.506cm" svg:x="2.058cm" svg:y="0.784cm" presentation:class="title">
          <draw:text-box>
            <text:p>Cas d'usage : clique sur la photo+ clique sur les flèches</text:p>
          </draw:text-box>
        </draw:frame>
        <draw:frame presentation:style-name="pr8" draw:layer="layout" svg:width="24.368cm" svg:height="13.714cm" svg:x="2.058cm" svg:y="5.453cm" presentation:class="outline">
          <draw:text-box>
            <text:list text:style-name="L2">
              <text:list-item>
                <text:p>Un test a été réalisé afin de vérifier le fonctionnement de la galerie d'images. Lors d'un clic sur une photographie, celle-ci s'ouvre correctement dans une fenêtre de visualisation (lightbox), permettant d'afficher l'image en grand format. Une fois la lightbox ouverte, les boutons de navigation « Précédent » et « Suivant » ont été testés. Un clic sur la flèche « Suivant » affiche correctement l'image suivante de la galerie, tandis qu'un clic sur la flèche « Précédent » permet de revenir à l'image précédente. Les transitions entre les images s'effectuent sans erreur et l'ensemble des photographies reste accessible via les boutons de navigation. Aucun dysfonctionnement n'a été constaté, le comportement de la galerie est conforme aux attentes et offre une navigation fluide à l'utilisateur. </text:p>
              </text:list-item>
            </text:list>
          </draw:text-box>
        </draw:frame>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draw:page draw:name="page12" draw:style-name="dp1" draw:master-page-name="lyt-darkblue" presentation:presentation-page-layout-name="AL2T1">
        <draw:frame presentation:style-name="pr7" draw:layer="layout" svg:width="23.911cm" svg:height="3.506cm" svg:x="2.058cm" svg:y="1cm" presentation:class="title" presentation:user-transformed="true">
          <draw:text-box>
            <text:p>Conclusion</text:p>
          </draw:text-box>
        </draw:frame>
        <draw:frame presentation:style-name="pr8" draw:layer="layout" svg:width="24.368cm" svg:height="13.714cm" svg:x="2.058cm" svg:y="5.453cm" presentation:class="outline" presentation:user-transformed="true">
          <draw:text-box>
            <text:p><text:span text:style-name="T1">L’ensemble des optimisations demandées a été réalisé. Le site bénéficie</text:span><text:span text:style-name="T1"><text:line-break/></text:span><text:span text:style-name="T1">désormais d’une meilleure accessibilité, de performances améliorées et</text:span><text:span text:style-name="T1"><text:line-break/></text:span><text:span text:style-name="T1">d’un référencement naturel renforcé grâce à l’optimisation des balises</text:span><text:span text:style-name="T1"><text:line-break/></text:span><text:span text:style-name="T1">HTML, des métadonnées, des données structurées et des contenus.</text:span></text:p>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ottola</meta:initial-creator>
    <meta:creation-date>2026-07-02T11:29:36.40</meta:creation-date>
    <meta:editing-duration>PT9M32S</meta:editing-duration>
    <meta:editing-cycles>3</meta:editing-cycles>
    <dc:date>2026-07-02T12:56:52.37</dc:date>
    <dc:creator>david Mottola</dc:creator>
    <meta:generator>OpenOffice/4.1.14$Win32 OpenOffice.org_project/4114m1$Build-9811</meta:generator>
    <meta:document-statistic meta:object-count="75"/>
  </office:meta>
</office:document-meta>
</file>