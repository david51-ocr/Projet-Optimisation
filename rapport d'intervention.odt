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d’intervention – Optimisation SEO et débogage du site de Nina Carducci<text:line-break/><text:line-break/>1. Contexte<text:line-break/><text:line-break/>Dans le cadre de cette intervention, l’objectif était d’améliorer les<text:line-break/>performances, l’accessibilité et le référencement naturel du site de la<text:line-break/>photographe Nina Carducci tout en corrigeant les problèmes techniques<text:line-break/>détectés.<text:line-break/><text:line-break/>2. Corrections réalisées<text:line-break/><text:line-break/>Optimisation des performances<text:line-break/><text:line-break/>- <text:s text:c="2"/>Conversion des images au format WebP afin de réduire leur poids.<text:line-break/>- <text:s text:c="2"/>Optimisation des ressources utilisées par le site.<text:line-break/>- <text:s text:c="2"/>Vérification des performances avec Lighthouse.<text:line-break/>- <text:s text:c="2"/>Réduction des éléments ralentissant le chargement des pages.<text:line-break/><text:line-break/>Accessibilité<text:line-break/><text:line-break/>- <text:s text:c="2"/>Ajout d’attributs alt descriptifs sur les images.<text:line-break/>- <text:s text:c="2"/>Amélioration de la hiérarchie des titres.<text:line-break/>- <text:s text:c="2"/>Association des balises label avec les champs du formulaire.<text:line-break/>- <text:s text:c="2"/>Amélioration du contraste de certains éléments détectés par<text:line-break/> <text:s text:c="3"/>Wave Evaluation Tool.<text:line-break/><text:line-break/>Référencement naturel (SEO)<text:line-break/><text:line-break/>- <text:s text:c="2"/>Optimisation de la balise Title.<text:line-break/>- <text:s text:c="2"/>Optimisation de la Meta Description.<text:line-break/>- <text:s text:c="2"/>Ajout des balises Open Graph.<text:line-break/>- <text:s text:c="2"/>Ajout des Twitter Cards.<text:line-break/>- <text:s text:c="2"/>Amélioration du référencement local avec les mots-clés « photographe<text:line-break/> <text:s text:c="3"/>à Bordeaux ».<text:line-break/>- <text:s text:c="2"/>Ajout de données structurées Schema.org (JSON-LD) de type<text:line-break/> <text:s text:c="3"/>LocalBusiness.<text:line-break/>- <text:s text:c="2"/>Optimisation des textes alternatifs (alt) des images.<text:line-break/><text:line-break/>Débogage<text:line-break/><text:line-break/>- <text:s text:c="2"/>Correction de la structure HTML.<text:line-break/>- <text:s text:c="2"/>Correction de la position de la balise<text:line-break/> <text:s text:c="3"/>.<text:line-break/>- <text:s text:c="2"/>Vérification de la validité des données structurées.<text:line-break/>- <text:s text:c="2"/>Correction de plusieurs problèmes signalés par Lighthouse.</text:p>
      <text:p text:style-name="Standard"/>
      <text:p text:style-name="Standard">- Résolution des bugs demandés. (le click sur les filtres et les flèches pour changer d'image)<text:line-break/><text:line-break/>3. Tests réalisés<text:line-break/><text:line-break/>- <text:s text:c="2"/>Audit Lighthouse.<text:line-break/>- <text:s text:c="2"/>Test des données structurées avec Google Rich Results Test.<text:line-break/><text:soft-page-break/>- <text:s text:c="2"/>Contrôle du fonctionnement du carrousel.<text:line-break/>- <text:s text:c="2"/>Vérification de la galerie filtrable.<text:line-break/>- <text:s text:c="2"/>Vérification du formulaire de contact.<text:line-break/>4. Résultats obtenus<text:line-break/><text:line-break/>- <text:s text:c="2"/>Amélioration des performances du site.<text:line-break/>- <text:s text:c="2"/>Amélioration de l’accessibilité.<text:line-break/>- <text:s text:c="2"/>Amélioration du référencement naturel.<text:line-break/>- <text:s text:c="2"/>Amélioration du référencement local.<text:line-break/>- <text:s text:c="2"/>Amélioration de l’expérience utilisateur.<text:line-break/><text:line-break/>5. Cahier de recette<text:line-break/><text:line-break/> <text:s/>Fonction <text:s text:c="16"/>Résultat<text:line-break/> <text:s/>------------------------ ----------<text:line-break/> <text:s/>Navigation <text:s text:c="14"/>Conforme<text:line-break/> <text:s/>Carrousel <text:s text:c="15"/>Conforme<text:line-break/> <text:s/>Galerie filtrable <text:s text:c="7"/>Conforme<text:line-break/> <text:s/>Images (attributs alt) <text:s text:c="2"/>Conforme<text:line-break/> <text:s/>Formulaire de contact <text:s text:c="3"/>Conforme<text:line-break/> <text:s/>Responsive <text:s text:c="14"/>Conforme<text:line-break/> <text:s/>Balises SEO <text:s text:c="13"/>Conforme<text:line-break/> <text:s/>Open Graph <text:s text:c="14"/>Conforme<text:line-break/> <text:s/>Twitter Cards <text:s text:c="11"/>Conforme<text:line-break/> <text:s/>Données structurées <text:s text:c="5"/>Conforme<text:line-break/><text:line-break/>Conclusion<text:line-break/><text:line-break/>L’ensemble des optimisations demandées a été réalisé. Le site bénéficie<text:line-break/>désormais d’une meilleure accessibilité, de performances améliorées et<text:line-break/>d’un référencement naturel renforcé grâce à l’optimisation des balises<text:line-break/>HTML, des métadonnées, des données structurées et des conten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Mottola</meta:initial-creator>
    <meta:creation-date>2026-07-01T09:17:27</meta:creation-date>
    <meta:document-statistic meta:table-count="0" meta:image-count="0" meta:object-count="0" meta:page-count="2" meta:paragraph-count="2" meta:word-count="364" meta:character-count="2811"/>
    <dc:date>2026-07-01T09:22:04.63</dc:date>
    <dc:creator>david Mottola</dc:creator>
    <meta:editing-duration>PT4M39S</meta:editing-duration>
    <meta:editing-cycles>1</meta:editing-cycles>
    <meta:generator>OpenOffice/4.1.14$Win32 OpenOffice.org_project/4114m1$Build-9811</meta:generator>
  </office:meta>
</office:document-meta>
</file>